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acba" officeooo:paragraph-rsid="000dacba"/>
    </style:style>
    <style:style style:name="P2" style:family="paragraph" style:parent-style-name="Standard">
      <style:text-properties officeooo:paragraph-rsid="000d3179"/>
    </style:style>
    <style:style style:name="P3" style:family="paragraph" style:parent-style-name="Standard">
      <style:text-properties officeooo:paragraph-rsid="000dacba"/>
    </style:style>
    <style:style style:name="P4" style:family="paragraph" style:parent-style-name="Standard">
      <style:text-properties officeooo:rsid="000dacba" officeooo:paragraph-rsid="000dacba"/>
    </style:style>
    <style:style style:name="P5" style:family="paragraph" style:parent-style-name="Standard">
      <style:text-properties officeooo:rsid="000df058" officeooo:paragraph-rsid="000df058"/>
    </style:style>
    <style:style style:name="P6" style:family="paragraph" style:parent-style-name="Standard">
      <style:text-properties officeooo:rsid="000ed1d0" officeooo:paragraph-rsid="000ed1d0"/>
    </style:style>
    <style:style style:name="P7" style:family="paragraph" style:parent-style-name="Standard">
      <style:text-properties officeooo:paragraph-rsid="000ed1d0"/>
    </style:style>
    <style:style style:name="P8" style:family="paragraph" style:parent-style-name="Standard">
      <style:text-properties officeooo:paragraph-rsid="000df058"/>
    </style:style>
    <style:style style:name="T1" style:family="text">
      <style:text-properties officeooo:rsid="000d3179"/>
    </style:style>
    <style:style style:name="T2" style:family="text">
      <style:text-properties officeooo:rsid="000dacba"/>
    </style:style>
    <style:style style:name="T3" style:family="text">
      <style:text-properties officeooo:rsid="000ed1d0"/>
    </style:style>
    <style:style style:name="T4" style:family="text">
      <style:text-properties officeooo:rsid="000df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based on choice data</text:p>
      <text:p text:style-name="P2"/>
      <text:p text:style-name="P2">Treatment 1: Visibility of the Cue<text:line-break/><text:line-break/>Research Question: Does displaying the badge on a hotel increase the probability that a consumer chooses it?<text:line-break/><text:line-break/>Outcome (Mlogit): Proba to pick hotel j (if hotel j gets or would have got the cue)<text:line-break/><text:line-break/>Outcome (reduced form): whether a product that would have received the cue was chosen, in presence VS in absence of Cue, individual fixed effect</text:p>
      <text:p text:style-name="P2"/>
      <text:p text:style-name="P3"><text:span text:style-name="T1">Refinements :</text:span><text:line-break/>-- <text:span text:style-name="T1">How to control for the p</text:span>osition <text:span text:style-name="T1">of cued properties </text:span>on the page <text:line-break/>-- Learning across the 12 choices: if a participant sees the badge in choice 1, they may anchor on it for all subsequent choices — even uncued ones. Or they may habituate and ignore it later. <text:line-break/><text:line-break/>Treatment 2: Clutter <text:line-break/><text:line-break/>Research Question: Does clutter make people rely more/less on the cue?</text:p>
      <text:p text:style-name="P3"/>
      <text:p text:style-name="P4">Outcome : whether a cued product is chosen</text:p>
      <text:p text:style-name="P4">Has_Cue interacted with Clutter</text:p>
      <text:p text:style-name="P3"><text:span text:style-name="T2">Refinements (addind the right fixed effects) :</text:span><text:line-break/>- Cluster×City FE absorbs hotel type within each city<text:line-break/>- City×Weekend FE absorbs choice-context variation<text:line-break/>- Individual controls (age, gender, Booking familiarity) replace participant FE</text:p>
      <text:p text:style-name="P3"/>
      <text:p text:style-name="P5">Research Question: welfare effect of the Cue</text:p>
      <text:p text:style-name="P5"/>
      <text:p text:style-name="P5">Outcome : proba to choose in presence of Cue a property from the cluster that was chosen twice without Cue ? (<text:span text:style-name="T3">note that </text:span>not all subjects will choose twice from the same cluster <text:span text:style-name="T3">in absence of cue</text:span>)</text:p>
      <text:p text:style-name="P5"/>
      <text:p text:style-name="P6">Other approach : estimate a multinomial logit model on choices made in absence of cue, and then evaluate the choices made in presence of cues using the estimated parameters form that model.</text:p>
      <text:p text:style-name="P6">Note that the code may on the long run random coefficients, so the coefficients of the model will be individual specific, whoich complicates a bit this part.</text:p>
      <text:p text:style-name="P6"/>
      <text:p text:style-name="P6"/>
      <text:p text:style-name="P7"><text:span text:style-name="T4">Manipulation </text:span>Check — <text:span text:style-name="T2">Meaningfull clusters: proba to pick cluster A without Cue conditional on having picked cluster A without Cue. Logit</text:span></text:p>
      <text:p text:style-name="P7"/>
      <text:p text:style-name="P7"/>
      <text:p text:style-name="P1">Analysis based on oTree data</text:p>
      <text:p text:style-name="P1"/>
      <text:p text:style-name="P8">Secondary Outcomes for Treatment 2: <text:line-break/>— Badge noticed (dilution mechanism) &gt; Binary from post-survey: did the participant notice the thumb icon?<text:line-break/><text:line-break/>Prediction: noticed more in Less Clutter condition<text:line-break/>Test: simple t-test between clutter groups, no controls needed<text:line-break/><text:line-break/><text:soft-page-break/>Outcome 2 — Search behavior (decision mode mechanism)<text:line-break/>% Several possible measures — you need to pre-specify exactly which ones:<text:line-break/><text:line-break/>% Time from page load to final click (total decision time)<text:line-break/>% Number of hotel detail pages opened<text:line-break/>% Number of hotels that appeared in viewport<text:line-break/>% Mouse travel distance (if tracked)<text:line-break/>% Response on NASA TLX mental demand subscale<text:line-break/><text:line-break/>% For each: t-test between clutter groups. Optionally control for choice order (1-12) and city, since search effort may vary across these.</text:p>
      <text:p text:style-name="P8"><text:line-break/>Manipulation Checks:<text:line-break/><text:line-break/>- Check 1 — Clutter perceived as cluttered</text:p>
      <text:p text:style-name="P3">Post-survey 7-point Likert on perceived visual complexity.</text:p>
      <text:p text:style-name="P3">Prediction: higher in Same Clutter condition. Test: t-test.</text:p>
      <text:p text:style-name="P3"/>
      <text:p text:style-name="P3"/>
      <text:p text:style-name="P3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8T14:14:27.007714100</meta:creation-date>
    <dc:date>2026-06-08T14:38:38.863406600</dc:date>
    <meta:editing-duration>PT13M57S</meta:editing-duration>
    <meta:editing-cycles>4</meta:editing-cycles>
    <meta:generator>LibreOffice/25.8.6.2$Windows_X86_64 LibreOffice_project/b4b39682cd9868fa725bc664aff94278d315bd04</meta:generator>
    <meta:document-statistic meta:table-count="0" meta:image-count="0" meta:object-count="0" meta:page-count="2" meta:paragraph-count="17" meta:word-count="445" meta:character-count="2763" meta:non-whitespace-character-count="2310"/>
  </office:meta>
</office:document-meta>
</file>